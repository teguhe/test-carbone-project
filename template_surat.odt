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alo, {d.nama}!<text:s/></text:p>
      <text:p text:style-name="Normal">Tanggal lahir: {d.tanggal_lahir}<text:s/></text:p>
      <text:p text:style-name="Normal">Kota: {d.kota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guh</meta:initial-creator>
    <dc:creator>teguh</dc:creator>
    <meta:creation-date>2026-04-27T02:07:00Z</meta:creation-date>
    <dc:date>2026-04-27T02:08:00Z</dc:date>
    <meta:template xlink:href="Normal" xlink:type="simple"/>
    <meta:editing-cycles>1</meta:editing-cycles>
    <meta:editing-duration>PT60S</meta:editing-duration>
    <meta:document-statistic meta:page-count="1" meta:paragraph-count="1" meta:word-count="9" meta:character-count="65" meta:row-count="1" meta:non-whitespace-character-count="57"/>
  </office:meta>
</office:document-meta>
</file>